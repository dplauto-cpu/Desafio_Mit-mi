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charset="x-symbol"/>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text-properties fo:color="#355269" loext:opacity="100%" fo:font-size="13pt" style:text-underline-style="solid" style:text-underline-width="auto" style:text-underline-color="font-color" fo:font-weight="bold" officeooo:rsid="00180678" officeooo:paragraph-rsid="001eaffe" style:font-size-asian="13pt" style:font-weight-asian="bold" style:font-size-complex="13pt" style:font-weight-complex="bold"/>
    </style:style>
    <style:style style:name="P2" style:family="paragraph" style:parent-style-name="Standard">
      <style:text-properties fo:font-style="italic" style:text-underline-style="none" fo:font-weight="normal" officeooo:rsid="00180678" officeooo:paragraph-rsid="001eaffe" style:font-style-asian="italic" style:font-weight-asian="normal" style:font-style-complex="italic" style:font-weight-complex="normal"/>
    </style:style>
    <style:style style:name="P3" style:family="paragraph" style:parent-style-name="Standard">
      <style:text-properties fo:font-style="italic" style:text-underline-style="none" fo:font-weight="normal" officeooo:rsid="003e0498" officeooo:paragraph-rsid="003e0498" style:font-style-asian="italic" style:font-weight-asian="normal" style:font-style-complex="italic" style:font-weight-complex="normal"/>
    </style:style>
    <style:style style:name="P4" style:family="paragraph" style:parent-style-name="Standard">
      <style:paragraph-properties fo:margin-left="1.251cm" fo:text-indent="0cm" style:auto-text-indent="false"/>
      <style:text-properties fo:font-style="italic" style:text-underline-style="none" fo:font-weight="normal" officeooo:rsid="003e0498" officeooo:paragraph-rsid="003e0498" style:font-style-asian="italic" style:font-weight-asian="normal" style:font-style-complex="italic" style:font-weight-complex="normal"/>
    </style:style>
    <style:style style:name="P5" style:family="paragraph" style:parent-style-name="Standard">
      <style:paragraph-properties fo:margin-left="1.251cm" fo:text-indent="0cm" style:auto-text-indent="false"/>
      <style:text-properties fo:font-style="italic" style:text-underline-style="none" fo:font-weight="normal" officeooo:rsid="003e0498" officeooo:paragraph-rsid="0040e54c" style:font-style-asian="italic" style:font-weight-asian="normal" style:font-style-complex="italic" style:font-weight-complex="normal"/>
    </style:style>
    <style:style style:name="P6" style:family="paragraph" style:parent-style-name="Standard">
      <style:text-properties fo:font-style="italic" style:text-underline-style="none" fo:font-weight="normal" officeooo:rsid="0020774f" officeooo:paragraph-rsid="0020774f" style:font-style-asian="italic" style:font-weight-asian="normal" style:font-style-complex="italic" style:font-weight-complex="normal"/>
    </style:style>
    <style:style style:name="P7" style:family="paragraph" style:parent-style-name="Standard">
      <style:text-properties fo:font-style="normal" style:text-underline-style="none" fo:font-weight="bold" officeooo:rsid="00416a38" officeooo:paragraph-rsid="00416a38" style:font-style-asian="normal" style:font-weight-asian="bold" style:font-style-complex="normal" style:font-weight-complex="bold"/>
    </style:style>
    <style:style style:name="P8" style:family="paragraph" style:parent-style-name="Standard">
      <style:text-properties fo:font-style="italic" style:text-underline-style="none" fo:font-weight="bold" officeooo:rsid="00180678" officeooo:paragraph-rsid="0020774f" style:font-style-asian="italic" style:font-weight-asian="bold" style:font-style-complex="italic" style:font-weight-complex="bold"/>
    </style:style>
    <style:style style:name="P9" style:family="paragraph" style:parent-style-name="Standard">
      <style:text-properties style:text-underline-style="solid" style:text-underline-width="auto" style:text-underline-color="font-color" officeooo:rsid="0019ca43" officeooo:paragraph-rsid="0019ca43"/>
    </style:style>
    <style:style style:name="P10" style:family="paragraph" style:parent-style-name="Standard">
      <style:text-properties officeooo:rsid="0019ca43" officeooo:paragraph-rsid="0019ca43"/>
    </style:style>
    <style:style style:name="P11" style:family="paragraph" style:parent-style-name="Standard">
      <style:paragraph-properties fo:margin-top="0cm" fo:margin-bottom="0.199cm" style:contextual-spacing="false"/>
      <style:text-properties officeooo:rsid="0019ca43" officeooo:paragraph-rsid="0019ca43"/>
    </style:style>
    <style:style style:name="P12" style:family="paragraph" style:parent-style-name="Standard" style:list-style-name="L1">
      <style:paragraph-properties fo:margin-top="0cm" fo:margin-bottom="0.199cm" style:contextual-spacing="false"/>
      <style:text-properties officeooo:rsid="0019ca43" officeooo:paragraph-rsid="0019ca43"/>
    </style:style>
    <style:style style:name="P13" style:family="paragraph" style:parent-style-name="Standard" style:list-style-name="L1">
      <style:paragraph-properties fo:margin-top="0cm" fo:margin-bottom="0.199cm" style:contextual-spacing="false"/>
      <style:text-properties officeooo:rsid="001d7a1e" officeooo:paragraph-rsid="0024ccca"/>
    </style:style>
    <style:style style:name="P14" style:family="paragraph" style:parent-style-name="Standard">
      <style:text-properties officeooo:rsid="001b2b2f" officeooo:paragraph-rsid="001b2b2f"/>
    </style:style>
    <style:style style:name="P15" style:family="paragraph" style:parent-style-name="Standard">
      <style:text-properties style:text-underline-style="solid" style:text-underline-width="auto" style:text-underline-color="font-color" officeooo:rsid="001b2b2f" officeooo:paragraph-rsid="001b2b2f"/>
    </style:style>
    <style:style style:name="P16" style:family="paragraph" style:parent-style-name="Standard" style:list-style-name="L2">
      <style:paragraph-properties fo:margin-top="0cm" fo:margin-bottom="0.199cm" style:contextual-spacing="false"/>
      <style:text-properties officeooo:rsid="001b2b2f" officeooo:paragraph-rsid="001b2b2f"/>
    </style:style>
    <style:style style:name="P17" style:family="paragraph" style:parent-style-name="Standard">
      <style:text-properties style:text-underline-style="solid" style:text-underline-width="auto" style:text-underline-color="font-color" officeooo:rsid="001addae" officeooo:paragraph-rsid="001addae"/>
    </style:style>
    <style:style style:name="P18" style:family="paragraph" style:parent-style-name="Standard">
      <style:text-properties officeooo:rsid="001addae" officeooo:paragraph-rsid="001addae"/>
    </style:style>
    <style:style style:name="P19" style:family="paragraph" style:parent-style-name="Standard">
      <style:paragraph-properties fo:margin-top="0cm" fo:margin-bottom="0.199cm" style:contextual-spacing="false"/>
      <style:text-properties officeooo:rsid="001cd072" officeooo:paragraph-rsid="001cd072"/>
    </style:style>
    <style:style style:name="P20" style:family="paragraph" style:parent-style-name="Standard">
      <style:text-properties officeooo:rsid="001cd072" officeooo:paragraph-rsid="001cd072"/>
    </style:style>
    <style:style style:name="P21" style:family="paragraph" style:parent-style-name="Standard">
      <style:paragraph-properties fo:margin-left="0cm" fo:margin-top="0cm" fo:margin-bottom="0.101cm" style:contextual-spacing="false" fo:text-indent="0cm" style:auto-text-indent="false"/>
      <style:text-properties style:text-underline-style="solid" style:text-underline-width="auto" style:text-underline-color="font-color" officeooo:rsid="001cd072" officeooo:paragraph-rsid="002583da"/>
    </style:style>
    <style:style style:name="P22" style:family="paragraph" style:parent-style-name="Standard" style:list-style-name="L3">
      <style:paragraph-properties fo:margin-top="0cm" fo:margin-bottom="0.101cm" style:contextual-spacing="false"/>
      <style:text-properties officeooo:rsid="002583da" officeooo:paragraph-rsid="002583da"/>
    </style:style>
    <style:style style:name="P23" style:family="paragraph" style:parent-style-name="Standard" style:list-style-name="L3">
      <style:paragraph-properties fo:margin-top="0cm" fo:margin-bottom="0.101cm" style:contextual-spacing="false"/>
      <style:text-properties officeooo:rsid="002583da" officeooo:paragraph-rsid="0026b7bd"/>
    </style:style>
    <style:style style:name="P24" style:family="paragraph" style:parent-style-name="Standard" style:list-style-name="L3">
      <style:paragraph-properties fo:margin-top="0cm" fo:margin-bottom="0.101cm" style:contextual-spacing="false"/>
      <style:text-properties officeooo:rsid="002583da" officeooo:paragraph-rsid="002a8cd9"/>
    </style:style>
    <style:style style:name="P25" style:family="paragraph" style:parent-style-name="Standard" style:list-style-name="L3">
      <style:paragraph-properties fo:margin-top="0cm" fo:margin-bottom="0.101cm" style:contextual-spacing="false"/>
      <style:text-properties officeooo:rsid="0026c02d" officeooo:paragraph-rsid="002a8cd9"/>
    </style:style>
    <style:style style:name="P26" style:family="paragraph" style:parent-style-name="Standard" style:list-style-name="L3">
      <style:paragraph-properties fo:margin-top="0cm" fo:margin-bottom="0.101cm" style:contextual-spacing="false"/>
      <style:text-properties officeooo:rsid="0026c02d" officeooo:paragraph-rsid="0026c02d"/>
    </style:style>
    <style:style style:name="P27" style:family="paragraph" style:parent-style-name="Standard">
      <style:paragraph-properties fo:margin-top="0cm" fo:margin-bottom="0.101cm" style:contextual-spacing="false"/>
      <style:text-properties officeooo:rsid="001cd072" officeooo:paragraph-rsid="0026c02d"/>
    </style:style>
    <style:style style:name="P28" style:family="paragraph" style:parent-style-name="Standard">
      <style:paragraph-properties fo:margin-top="0cm" fo:margin-bottom="0.101cm" style:contextual-spacing="false"/>
      <style:text-properties style:text-underline-style="solid" style:text-underline-width="auto" style:text-underline-color="font-color" officeooo:rsid="001cd072" officeooo:paragraph-rsid="001cd072"/>
    </style:style>
    <style:style style:name="P29" style:family="paragraph" style:parent-style-name="Standard" style:list-style-name="L4">
      <style:paragraph-properties fo:margin-top="0cm" fo:margin-bottom="0.101cm" style:contextual-spacing="false"/>
      <style:text-properties officeooo:rsid="0026b7bd" officeooo:paragraph-rsid="0026b7bd"/>
    </style:style>
    <style:style style:name="P30" style:family="paragraph" style:parent-style-name="Standard" style:list-style-name="L4">
      <style:paragraph-properties fo:margin-top="0cm" fo:margin-bottom="0.101cm" style:contextual-spacing="false"/>
      <style:text-properties officeooo:rsid="0026c02d" officeooo:paragraph-rsid="0026c02d"/>
    </style:style>
    <style:style style:name="P31" style:family="paragraph" style:parent-style-name="Standard" style:list-style-name="L4">
      <style:text-properties officeooo:rsid="0026c02d" officeooo:paragraph-rsid="0026c02d"/>
    </style:style>
    <style:style style:name="P32" style:family="paragraph" style:parent-style-name="Standard" style:list-style-name="L4">
      <style:text-properties officeooo:rsid="00339217" officeooo:paragraph-rsid="00339217"/>
    </style:style>
    <style:style style:name="P33" style:family="paragraph" style:parent-style-name="Standard">
      <style:text-properties officeooo:rsid="0019ca43" officeooo:paragraph-rsid="001addae"/>
    </style:style>
    <style:style style:name="P34" style:family="paragraph" style:parent-style-name="Standard" style:list-style-name="L5">
      <style:paragraph-properties fo:margin-top="0cm" fo:margin-bottom="0.199cm" style:contextual-spacing="false"/>
      <style:text-properties officeooo:paragraph-rsid="001e6296"/>
    </style:style>
    <style:style style:name="P35" style:family="paragraph" style:parent-style-name="Standard">
      <style:text-properties officeooo:rsid="00180678" officeooo:paragraph-rsid="0019ca43"/>
    </style:style>
    <style:style style:name="P36" style:family="paragraph" style:parent-style-name="Standard">
      <style:text-properties style:text-underline-style="solid" style:text-underline-width="auto" style:text-underline-color="font-color" officeooo:rsid="001addae" officeooo:paragraph-rsid="0039183e"/>
    </style:style>
    <style:style style:name="P37" style:family="paragraph" style:parent-style-name="Standard" style:list-style-name="L5">
      <style:paragraph-properties fo:margin-top="0cm" fo:margin-bottom="0.199cm" style:contextual-spacing="false"/>
      <style:text-properties officeooo:rsid="0039183e" officeooo:paragraph-rsid="0039183e"/>
    </style:style>
    <style:style style:name="P38" style:family="paragraph" style:parent-style-name="Standard">
      <style:paragraph-properties fo:margin-top="0cm" fo:margin-bottom="0.199cm" style:contextual-spacing="false"/>
      <style:text-properties fo:color="#1d1c1d" loext:opacity="100%" officeooo:rsid="00180678" officeooo:paragraph-rsid="001e6296"/>
    </style:style>
    <style:style style:name="P39" style:family="paragraph" style:parent-style-name="Standard">
      <style:paragraph-properties fo:margin-top="0cm" fo:margin-bottom="0.199cm" style:contextual-spacing="false"/>
      <style:text-properties officeooo:rsid="00180678" officeooo:paragraph-rsid="001e6296"/>
    </style:style>
    <style:style style:name="P40" style:family="paragraph" style:parent-style-name="Standard">
      <style:paragraph-properties fo:margin-top="0cm" fo:margin-bottom="0.199cm" style:contextual-spacing="false"/>
      <style:text-properties fo:font-weight="bold" officeooo:rsid="00416a38" officeooo:paragraph-rsid="00416a38" style:font-weight-asian="bold" style:font-weight-complex="bold"/>
    </style:style>
    <style:style style:name="P41" style:family="paragraph" style:parent-style-name="Standard" style:list-style-name="L6">
      <style:paragraph-properties fo:margin-top="0cm" fo:margin-bottom="0.199cm" style:contextual-spacing="false"/>
      <style:text-properties officeooo:rsid="0042b086" officeooo:paragraph-rsid="0042b086"/>
    </style:style>
    <style:style style:name="P42" style:family="paragraph" style:parent-style-name="Standard" style:list-style-name="L6">
      <style:paragraph-properties fo:margin-top="0cm" fo:margin-bottom="0.199cm" style:contextual-spacing="false"/>
      <style:text-properties officeooo:rsid="0044316a" officeooo:paragraph-rsid="0044316a"/>
    </style:style>
    <style:style style:name="P43" style:family="paragraph" style:parent-style-name="Standard" style:list-style-name="L6">
      <style:paragraph-properties fo:margin-top="0cm" fo:margin-bottom="0.199cm" style:contextual-spacing="false"/>
      <style:text-properties officeooo:rsid="00452008" officeooo:paragraph-rsid="00452008"/>
    </style:style>
    <style:style style:name="P44" style:family="paragraph" style:parent-style-name="Standard" style:list-style-name="L6">
      <style:paragraph-properties fo:margin-top="0cm" fo:margin-bottom="0.199cm" style:contextual-spacing="false"/>
      <style:text-properties officeooo:rsid="004702f8" officeooo:paragraph-rsid="004702f8"/>
    </style:style>
    <style:style style:name="P45" style:family="paragraph" style:parent-style-name="Standard" style:list-style-name="L6">
      <style:paragraph-properties fo:margin-top="0cm" fo:margin-bottom="0.199cm" style:contextual-spacing="false"/>
      <style:text-properties officeooo:rsid="00472602" officeooo:paragraph-rsid="00472602"/>
    </style:style>
    <style:style style:name="P46" style:family="paragraph" style:parent-style-name="Standard" style:list-style-name="L6">
      <style:paragraph-properties fo:margin-top="0cm" fo:margin-bottom="0.199cm" style:contextual-spacing="false"/>
      <style:text-properties officeooo:rsid="0049008d" officeooo:paragraph-rsid="0049008d"/>
    </style:style>
    <style:style style:name="P47" style:family="paragraph" style:parent-style-name="Standard" style:list-style-name="L6">
      <style:paragraph-properties fo:margin-top="0cm" fo:margin-bottom="0.199cm" style:contextual-spacing="false"/>
      <style:text-properties officeooo:rsid="0049859a" officeooo:paragraph-rsid="0049859a"/>
    </style:style>
    <style:style style:name="P48" style:family="paragraph" style:parent-style-name="Standard">
      <style:paragraph-properties fo:margin-top="0cm" fo:margin-bottom="0.199cm" style:contextual-spacing="false"/>
      <style:text-properties officeooo:rsid="004702f8" officeooo:paragraph-rsid="00452008"/>
    </style:style>
    <style:style style:name="P49" style:family="paragraph" style:parent-style-name="Standard">
      <style:paragraph-properties fo:margin-top="0cm" fo:margin-bottom="0.199cm" style:contextual-spacing="false"/>
      <style:text-properties officeooo:rsid="0042b086" officeooo:paragraph-rsid="0042b086"/>
    </style:style>
    <style:style style:name="T1" style:family="text">
      <style:text-properties officeooo:rsid="001eaffe"/>
    </style:style>
    <style:style style:name="T2" style:family="text">
      <style:text-properties officeooo:rsid="00180678"/>
    </style:style>
    <style:style style:name="T3" style:family="text">
      <style:text-properties officeooo:rsid="0040e54c"/>
    </style:style>
    <style:style style:name="T4" style:family="text">
      <style:text-properties fo:color="#3faf46" loext:opacity="100%" officeooo:rsid="0040e54c"/>
    </style:style>
    <style:style style:name="T5" style:family="text">
      <style:text-properties fo:color="#3faf46" loext:opacity="100%"/>
    </style:style>
    <style:style style:name="T6" style:family="text">
      <style:text-properties officeooo:rsid="002ece85"/>
    </style:style>
    <style:style style:name="T7" style:family="text">
      <style:text-properties officeooo:rsid="0027c306"/>
    </style:style>
    <style:style style:name="T8" style:family="text">
      <style:text-properties officeooo:rsid="0027b0a1"/>
    </style:style>
    <style:style style:name="T9" style:family="text">
      <style:text-properties officeooo:rsid="002983bc"/>
    </style:style>
    <style:style style:name="T10" style:family="text">
      <style:text-properties officeooo:rsid="00317b41"/>
    </style:style>
    <style:style style:name="T11" style:family="text">
      <style:text-properties officeooo:rsid="002a218b"/>
    </style:style>
    <style:style style:name="T12" style:family="text">
      <style:text-properties officeooo:rsid="002a795c"/>
    </style:style>
    <style:style style:name="T13" style:family="text">
      <style:text-properties officeooo:rsid="003359ea"/>
    </style:style>
    <style:style style:name="T14" style:family="text">
      <style:text-properties officeooo:rsid="001c0741"/>
    </style:style>
    <style:style style:name="T15" style:family="text">
      <style:text-properties officeooo:rsid="0026b7bd"/>
    </style:style>
    <style:style style:name="T16" style:family="text">
      <style:text-properties officeooo:rsid="002a8cd9"/>
    </style:style>
    <style:style style:name="T17" style:family="text">
      <style:text-properties officeooo:rsid="003aa777"/>
    </style:style>
    <style:style style:name="T18" style:family="text">
      <style:text-properties officeooo:rsid="002b1ed8"/>
    </style:style>
    <style:style style:name="T19" style:family="text">
      <style:text-properties officeooo:rsid="001e6296"/>
    </style:style>
    <style:style style:name="T20" style:family="text">
      <style:text-properties officeooo:rsid="002df0b8"/>
    </style:style>
    <style:style style:name="T21" style:family="text">
      <style:text-properties officeooo:rsid="0039183e"/>
    </style:style>
    <style:style style:name="T22" style:family="text">
      <style:text-properties officeooo:rsid="003c4290"/>
    </style:style>
    <style:style style:name="T23" style:family="text">
      <style:text-properties fo:color="#1d1c1d" loext:opacity="100%" officeooo:rsid="00180678"/>
    </style:style>
    <style:style style:name="T24" style:family="text">
      <style:text-properties officeooo:rsid="0044316a"/>
    </style:style>
    <style:style style:name="T25" style:family="text">
      <style:text-properties officeooo:rsid="0045dbd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UNIÓN CLIENTE MITUMI</text:p>
      <text:p text:style-name="P1"/>
      <text:p text:style-name="P2"><text:span text:style-name="T1">FECHA :</text:span>7/07/26, 09:00 H.</text:p>
      <text:p text:style-name="P3">LUGAR: <text:span text:style-name="T2"><text:s/>SEDE MITUMI</text:span></text:p>
      <text:p text:style-name="P3"/>
      <text:p text:style-name="P3">ASISTENTES:</text:p>
      <text:p text:style-name="P4">- MITUMI: MARI <text:span text:style-name="T3">GONZÁLEZ DE DURANA (DIRECTORA DE EVENTOS CORPORATIVOS)</text:span> Y CRUZ <text:span text:style-name="T3">BARROSO (GESRTORA DE EVENTOS)</text:span> <text:s text:c="2"/></text:p>
      <text:p text:style-name="P5">- EQUIPO DESAFIO TRIPULACIONE BOOTCAMP: IÑIGO <text:span text:style-name="T3">IBARLUCEA MORENO (FULL STACK)</text:span> Y LEIRE ARRIETA <text:span text:style-name="T3">(DATA SCIENCE)</text:span></text:p>
      <text:p text:style-name="P4"/>
      <text:p text:style-name="P6">______________________________________________________________________________</text:p>
      <text:p text:style-name="P3"/>
      <text:p text:style-name="P3"><text:span text:style-name="T4">EN EL ACTA SE RECOGE EN UNA PRIMERA PARTE LOS TEMAS A TRATAR EN LA REUNIÓN, Y EN UNA SEGUNDA PARTE LA INFORMACIÓN RECOGIDA EN LA MISMA.</text:span><text:span text:style-name="T5"> </text:span></text:p>
      <text:p text:style-name="P3"/>
      <text:p text:style-name="P6"/>
      <text:p text:style-name="P7">TEMAS A TRATAR:</text:p>
      <text:p text:style-name="P7"/>
      <text:p text:style-name="P8"><text:s text:c="3"/></text:p>
      <text:p text:style-name="P9"><text:span text:style-name="T6">SOBRE EL </text:span>PROCESO</text:p>
      <text:p text:style-name="P10"/>
      <text:p text:style-name="P11">Aclarar cómo se inicia el proceso y en qué momento se da por creado el evento:</text:p>
      <text:list text:style-name="L1">
        <text:list-item>
          <text:p text:style-name="P12">¿Cuál es la información básica necesaria para iniciarlo?. <text:span text:style-name="T7">Según esquema presentado: número de p</text:span>ersonas participantes (capacidad exigida espacio), localización <text:span text:style-name="T7">y</text:span> fechas. ¿Algo más?</text:p>
        </text:list-item>
        <text:list-item>
          <text:p text:style-name="P12"><text:span text:style-name="T8">¿Quién lleva la i</text:span>niciativa?: <text:span text:style-name="T8">¿</text:span>siempre bajo petición del cliente o <text:span text:style-name="T8">realiz</text:span><text:span text:style-name="T9">an también</text:span><text:span text:style-name="T8"> una</text:span> labor proactiva? ¿Tienen alguna herramienta para la búsqueda activa de eventos? ¿Podría ser interesante disponer de alguna herramienta?</text:p>
        </text:list-item>
        <text:list-item>
          <text:p text:style-name="P12">Presupuesto: ¿cuál es la <text:span text:style-name="T10">mecánica de funcionamiento</text:span>? ¿El cliente viene con un presupuesto cerrado y se ajustan? ¿Son ellas las que dan un presupuesto inicial a partir de la idea de evento planteada? <text:span text:style-name="T10">¿Ambas opciones?</text:span> ¿Una vez se cierra el presupuesto, <text:span text:style-name="T11">se dispone</text:span> de algún margen, o es inamovible?</text:p>
        </text:list-item>
        <text:list-item>
          <text:p text:style-name="P13">Fase 4: “Recepción de la temática del evento por parte del cliente”, ¿a qué se refiere?</text:p>
        </text:list-item>
      </text:list>
      <text:p text:style-name="P14"/>
      <text:p text:style-name="P14"/>
      <text:p text:style-name="P14"/>
      <text:p text:style-name="P15"><text:span text:style-name="T6">SOBRE LA </text:span>PLATAFORMA <text:span text:style-name="T6">DE </text:span>GESTIÓN <text:span text:style-name="T6">DE EVENTOS</text:span></text:p>
      <text:p text:style-name="P14"/>
      <text:list text:style-name="L2">
        <text:list-item>
          <text:p text:style-name="P16">Roles dentro de la plataforma: ¿<text:span text:style-name="T12">todo el personal de Mitumi</text:span> tiene el mismo estatus en relación con los proyectos o funcionan con estatus diferenciados? ¿<text:span text:style-name="T13">Debería haber f</text:span>unciones restringidas a ciertos <text:span text:style-name="T12">perfiles</text:span>? <text:span text:style-name="T14">(ej.: aprobación de presupuesto solo coordinadora </text:span><text:span text:style-name="T12">de evento</text:span><text:span text:style-name="T14">)</text:span></text:p>
        </text:list-item>
        <text:list-item>
          <text:p text:style-name="P16">Visualización eventos: ¿todas ven todo, o solo <text:span text:style-name="T12">ven </text:span>aquéllos eventos en cuya organización estén participando?</text:p>
        </text:list-item>
      </text:list>
      <text:p text:style-name="P14"/>
      <text:p text:style-name="P14"/>
      <text:p text:style-name="P10"/>
      <text:p text:style-name="P17"><text:span text:style-name="T6">SOBRE LOS </text:span>PROVEEDORES/SERVICIOS <text:span text:style-name="T6">CONTRATADOS</text:span></text:p>
      <text:p text:style-name="P18"/>
      <text:p text:style-name="P19"><text:soft-page-break/>Contraste de listado de tipos de proveedores/servicios a incluir en el evento (a partir de la información aportada y elaboración propia):</text:p>
      <text:p text:style-name="P20"/>
      <text:p text:style-name="P21">Mitumi:</text:p>
      <text:list text:style-name="L3">
        <text:list-item>
          <text:p text:style-name="P22">Espacio eventos</text:p>
        </text:list-item>
        <text:list-item>
          <text:p text:style-name="P22">Alojamiento (hoteles,...)</text:p>
        </text:list-item>
        <text:list-item>
          <text:p text:style-name="P22">Transporte: taxi, microbus,…</text:p>
        </text:list-item>
        <text:list-item>
          <text:p text:style-name="P22">Audiovisual (sonido, iluminación, pantallas)</text:p>
        </text:list-item>
        <text:list-item>
          <text:p text:style-name="P23">Personal:</text:p>
          <text:list>
            <text:list-item>
              <text:p text:style-name="P23"><text:span text:style-name="T15">az</text:span>afatas</text:p>
            </text:list-item>
            <text:list-item>
              <text:p text:style-name="P23">seguridad,</text:p>
            </text:list-item>
            <text:list-item>
              <text:p text:style-name="P23">...</text:p>
            </text:list-item>
          </text:list>
        </text:list-item>
        <text:list-item>
          <text:p text:style-name="P22">Acomodación y mobiliario del local</text:p>
        </text:list-item>
        <text:list-item>
          <text:p text:style-name="P24">Catering</text:p>
        </text:list-item>
        <text:list-item>
          <text:p text:style-name="P25"><text:span text:style-name="T16">Imagen: f</text:span>otógrafos, grabación videos,…</text:p>
        </text:list-item>
        <text:list-item>
          <text:p text:style-name="P26">Ponentes</text:p>
        </text:list-item>
        <text:list-item>
          <text:p text:style-name="P26"><text:span text:style-name="T16">D</text:span>iseño y desarrollo de parte creativa (catelería, fondos,…)</text:p>
        </text:list-item>
        <text:list-item>
          <text:p text:style-name="P26">Merchandising</text:p>
        </text:list-item>
        <text:list-item>
          <text:p text:style-name="P26">Acreditaciones</text:p>
        </text:list-item>
      </text:list>
      <text:p text:style-name="P27"/>
      <text:p text:style-name="P28">Otros posibles proveedores/servicios: </text:p>
      <text:list text:style-name="L4">
        <text:list-item>
          <text:p text:style-name="P29">Presentadores eventos: <text:span text:style-name="T17">¿relación con los presentadores?</text:span></text:p>
        </text:list-item>
        <text:list-item>
          <text:p text:style-name="P29">Música en vivo</text:p>
        </text:list-item>
        <text:list-item>
          <text:p text:style-name="P30"><text:span text:style-name="T16">P</text:span>áginas web/aplicaciones para eventos</text:p>
        </text:list-item>
        <text:list-item>
          <text:p text:style-name="P31"><text:span text:style-name="T18">Organización de a</text:span>ctividades dirigidas a ponentes o/y asistentes (cenas, visitas culturales, catas,…)</text:p>
        </text:list-item>
        <text:list-item>
          <text:p text:style-name="P32">Atención sanitaria en caso de eventos grandes</text:p>
        </text:list-item>
      </text:list>
      <text:p text:style-name="P33"/>
      <text:p text:style-name="P10"/>
      <text:p text:style-name="P10"/>
      <text:p text:style-name="P17"><text:span text:style-name="T6">SOBRE LOS </text:span>PONENTES</text:p>
      <text:p text:style-name="P18"/>
      <text:list text:style-name="L5">
        <text:list-item>
          <text:p text:style-name="P34"><text:span text:style-name="T1">D</text:span><text:span text:style-name="T19">etalle de la información que se solicita a los ponentes.</text:span></text:p>
        </text:list-item>
        <text:list-item>
          <text:p text:style-name="P34"><text:span text:style-name="T19">Ficha “Nombre ponente_ficha base”: ¿incluye toda la información que se facilita al ponente cara a la celebración del evento?</text:span><text:span text:style-name="T20">¿ Necesidad de incorporar alguna otra información?</text:span></text:p>
        </text:list-item>
      </text:list>
      <text:p text:style-name="P10"/>
      <text:p text:style-name="P10"/>
      <text:p text:style-name="P35"/>
      <text:p text:style-name="P36"><text:span text:style-name="T6">SOBRE L</text:span><text:span text:style-name="T21">OS PRESUPUESTOS</text:span></text:p>
      <text:p text:style-name="P36"/>
      <text:list text:continue-numbering="true" text:style-name="L5">
        <text:list-item>
          <text:p text:style-name="P37">En el diseño del presupuesto para el cliente, pregunta relacionada con el margen a aplicar a los presupuestos: ¿cómo se calcula y aplica el margen comercial?,</text:p>
          <text:list>
            <text:list-item>
              <text:p text:style-name="P37">¿<text:span text:style-name="T22">m</text:span>andan un presupuesto completo, con un importe y un único concepto completo que se llame evento X, </text:p>
            </text:list-item>
            <text:list-item>
              <text:p text:style-name="P37"><text:soft-page-break/>o, se m<text:span text:style-name="T23">anda un presupuesto detallado, con un escandallo de costes y a cada coste se le añade el margen comercial de la empresa, siendo un pocentaje diferente o igual en cada coste según el caso?</text:span></text:p>
            </text:list-item>
          </text:list>
        </text:list-item>
      </text:list>
      <text:p text:style-name="P38"><text:span text:style-name="T23"/></text:p>
      <text:p text:style-name="P39"/>
      <text:p text:style-name="P39"/>
      <text:p text:style-name="P40">INFORMACIÓN RECOGIDA:</text:p>
      <text:p text:style-name="P39"/>
      <text:list text:style-name="L6">
        <text:list-item>
          <text:p text:style-name="P41">En la reunión se confirma que el tipo de eventos sobre los que quieren que trabajemos y que son el objetivo del proyecto son los eventos de tipo congresual, aquellos en los que intervienen ponentes, cuya gestión es su principal quebradero de cabeza.</text:p>
        </text:list-item>
        <text:list-item>
          <text:p text:style-name="P41">Los tres elementos clave que se definen al inicio de un proyecto, y que dan lugar a la creación de l evento son: el número de personas participantes, la ubicación (ciudad) y las fechas. A partir de ahí se empieza a trabajar en la búsqueda de espacios.</text:p>
        </text:list-item>
        <text:list-item>
          <text:p text:style-name="P41">Una de sus principales preocupaciones y quebrdero de cabeza es la comunicación con los clientes: que tengan disponible toda la información sobre su participación, traslados,…, que los documentos de presentación lleguen correctamente, que no haya pérdidas de información ni flujos de información diferentes,… A la pregunta de si es necesario que se registren en la plataforma a crear para tener la información relativa a su participación, y para el envío de sus ponencias, convenimos que la idea de obligarles a registrarse como un usuario no es la más conveniente, sobre todo teniendo en cuenta que muchos colaboran con ellos una sola vez. El objetivo sería que tengan un link de usuario único que comunique con la plataforma y se convierta en el canal único de comunicación <text:span text:style-name="T24">entre cliente y MITUMI, con todo el flujo de información,…Que luego se utilice whatsapp u otro canal para el intercambio de información, es secundario.IMPORTANTE: que un día antes de la celebración del evento el ponente reciba una notificación/documento con toda la información de su participación (vuelos, horario, hoteles,…).</text:span></text:p>
        </text:list-item>
        <text:list-item>
          <text:p text:style-name="P42">Sobre usuarios y roles en la plataforma, por parte de MITUMI: no quieren roles diferentes, incluso les parece bien que haya un solo usuario común.</text:p>
        </text:list-item>
        <text:list-item>
          <text:p text:style-name="P43">Sobre la forma de contratación: la mayoría de eventos de este tipo van vía concurso público (GV, Ayuntamientos,…). A veces petición directa del cliente. No hacen labor proactiva de creación de eventos, contacto con clientes para animar a la creación de nuevos eventos,…</text:p>
        </text:list-item>
        <text:list-item>
          <text:p text:style-name="P43">Sobre cómo gestionan lo relacionado con el diseño del presupuesto y márgenes: el detalle/desglose del presupuesto depende del cliente, a veces muy detallado y otras no. Los márgenes <text:span text:style-name="T25">comerciales se aplican sobre las partes que se correspoden con sus honorarios personales, son de entre un 10% a un 20% aproximadamente, dependiendo de proyectos. Siempre añaden un 3% por imprevistos.</text:span></text:p>
        </text:list-item>
        <text:list-item>
          <text:p text:style-name="P44">Un aspecto que les interesaría es la optimización de traslados entre ponentes: buscar la fórmula para programar traslados (aeropuerto-hotel) entre varios ponentes cuando los vuelos son próximos en el tiempo.</text:p>
        </text:list-item>
        <text:list-item>
          <text:p text:style-name="P45">Respecto al detalle de servicios: son muchos y muy variados. A los que más atención quieren que prestemos, más estrandarizables son y más afectan al primer presupuesto del evento son: </text:p>
          <text:list>
            <text:list-item>
              <text:p text:style-name="P45">Audiovisual. Importante sonido por ponentes.</text:p>
            </text:list-item>
            <text:list-item>
              <text:p text:style-name="P45">Catering</text:p>
            </text:list-item>
            <text:list-item>
              <text:p text:style-name="P45">Infraestructura: montaje de escenarios,…</text:p>
              <text:p text:style-name="P45"><text:soft-page-break/>Algunos aspectos son muy complejos (temas creativos y de contenido/temáticos), y otros vienen mucnhas veces dados por el espacio (seguridad, limpieza,…).</text:p>
            </text:list-item>
          </text:list>
        </text:list-item>
        <text:list-item>
          <text:p text:style-name="P46">Para diseño de prespupuesto inicial tener en cuenta: <text:s/></text:p>
          <text:list>
            <text:list-item>
              <text:p text:style-name="P46">Audiovisuales: para crear prespuesto les vendría bien conocer precios de pantallas, micros diadema, técnico sonido.</text:p>
            </text:list-item>
            <text:list-item>
              <text:p text:style-name="P46">Catering: con precios promedios (desayuno/pax, comida/pax,…)</text:p>
            </text:list-item>
            <text:list-item>
              <text:p text:style-name="P46">Alquiler espacio</text:p>
            </text:list-item>
          </text:list>
        </text:list-item>
        <text:list-item>
          <text:p text:style-name="P47">La información de partida que se pide al ponente:</text:p>
          <text:list>
            <text:list-item>
              <text:p text:style-name="P47">nombre</text:p>
            </text:list-item>
            <text:list-item>
              <text:p text:style-name="P47">dni</text:p>
            </text:list-item>
            <text:list-item>
              <text:p text:style-name="P47">documento ponencia</text:p>
            </text:list-item>
            <text:list-item>
              <text:p text:style-name="P47">origen viaje</text:p>
            </text:list-item>
            <text:list-item>
              <text:p text:style-name="P47">fechas/horarios</text:p>
            </text:list-item>
          </text:list>
        </text:list-item>
      </text:list>
      <text:p text:style-name="P48"/>
      <text:p text:style-name="P49"/>
      <text:p text:style-name="P49"/>
      <text:p text:style-name="P49"/>
      <text:p text:style-name="P49"/>
      <text:p text:style-name="P49"/>
      <text:p text:style-name="P39"/>
      <text:p text:style-name="P39"/>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charset="x-symbol"/>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Estilo_20_de_20_dibujo_20_predeterminado" style:display-name="Estilo de dibujo predeterminado" style:family="paragraph">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alibri" fo:font-family="Calibri" style:font-family-generic="roman" style:font-pitch="variable" style:font-charset="x-symbol"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06T12:41:36.597206800</meta:creation-date>
    <dc:date>2026-07-09T13:18:02.217794700</dc:date>
    <meta:editing-duration>PT21H19M7S</meta:editing-duration>
    <meta:editing-cycles>52</meta:editing-cycles>
    <meta:generator>LibreOffice/26.2.4.2$Windows_X86_64 LibreOffice_project/0229ac93fcf0d7cbc6376066c6f35021cef002dc</meta:generator>
    <meta:document-statistic meta:table-count="0" meta:image-count="0" meta:object-count="0" meta:page-count="4" meta:paragraph-count="73" meta:word-count="1073" meta:character-count="6789" meta:non-whitespace-character-count="5828"/>
  </office:meta>
</office:document-meta>
</file>