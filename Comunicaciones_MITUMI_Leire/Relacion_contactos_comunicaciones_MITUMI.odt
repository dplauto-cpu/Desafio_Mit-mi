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55269" loext:opacity="100%" fo:font-size="13pt" style:text-underline-style="solid" style:text-underline-width="auto" style:text-underline-color="font-color" fo:font-weight="bold" officeooo:rsid="0049b6ff" officeooo:paragraph-rsid="0049b6ff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355269" loext:opacity="100%" fo:font-size="13pt" style:text-underline-style="solid" style:text-underline-width="auto" style:text-underline-color="font-color" fo:font-weight="bold" officeooo:rsid="00180678" officeooo:paragraph-rsid="001eaffe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355269" loext:opacity="100%" fo:font-size="12pt" fo:font-style="italic" style:text-underline-style="solid" style:text-underline-width="auto" style:text-underline-color="font-color" fo:font-weight="bold" officeooo:rsid="00180678" officeooo:paragraph-rsid="001eaffe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color="#355269" loext:opacity="100%" fo:font-size="12pt" style:text-underline-style="solid" style:text-underline-width="auto" style:text-underline-color="font-color" fo:font-weight="bold" officeooo:rsid="00180678" officeooo:paragraph-rsid="001eaffe" style:font-size-asian="12pt" style:font-weight-asian="bold" style:font-size-complex="12pt" style:font-weight-complex="bold"/>
    </style:style>
    <style:style style:name="P5" style:family="paragraph" style:parent-style-name="Standard">
      <style:text-properties fo:font-style="italic" style:text-underline-style="none" fo:font-weight="normal" officeooo:rsid="00180678" officeooo:paragraph-rsid="001eaff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3e0498" officeooo:paragraph-rsid="003e0498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1.251cm" fo:text-indent="0cm" style:auto-text-indent="false"/>
      <style:text-properties fo:font-style="italic" style:text-underline-style="none" fo:font-weight="normal" officeooo:rsid="003e0498" officeooo:paragraph-rsid="003e0498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1.251cm" fo:text-indent="0cm" style:auto-text-indent="false"/>
      <style:text-properties fo:font-style="italic" style:text-underline-style="none" fo:font-weight="normal" officeooo:rsid="003e0498" officeooo:paragraph-rsid="0040e54c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text-underline-style="none" fo:font-weight="normal" officeooo:rsid="0020774f" officeooo:paragraph-rsid="0020774f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rsid="00180678" officeooo:paragraph-rsid="003e0498"/>
    </style:style>
    <style:style style:name="P11" style:family="paragraph" style:parent-style-name="Standard">
      <style:text-properties fo:color="#355269" loext:opacity="100%" fo:font-size="12pt" fo:font-style="italic" style:text-underline-style="solid" style:text-underline-width="auto" style:text-underline-color="font-color" fo:font-weight="bold" officeooo:rsid="00180678" officeooo:paragraph-rsid="004b5b02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officeooo:rsid="004a61ec" officeooo:paragraph-rsid="004a61ec"/>
    </style:style>
    <style:style style:name="P13" style:family="paragraph" style:parent-style-name="Standard">
      <style:text-properties fo:font-weight="bold" officeooo:rsid="004bf523" officeooo:paragraph-rsid="004bf523" style:font-weight-asian="bold" style:font-weight-complex="bold"/>
    </style:style>
    <style:style style:name="P14" style:family="paragraph" style:parent-style-name="Standard">
      <style:text-properties officeooo:rsid="004bf523" officeooo:paragraph-rsid="004bf523"/>
    </style:style>
    <style:style style:name="P15" style:family="paragraph" style:parent-style-name="Standard">
      <style:text-properties fo:font-style="italic" style:text-underline-style="none" fo:font-weight="normal" officeooo:rsid="00180678" officeooo:paragraph-rsid="004bf523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style:text-underline-style="none" fo:font-weight="normal" officeooo:rsid="003e0498" officeooo:paragraph-rsid="004bf523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1.251cm" fo:text-indent="0cm" style:auto-text-indent="false"/>
      <style:text-properties fo:font-style="italic" style:text-underline-style="none" fo:font-weight="normal" officeooo:rsid="003e0498" officeooo:paragraph-rsid="004bf523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officeooo:rsid="004d448d" officeooo:paragraph-rsid="004d448d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4bf523" officeooo:paragraph-rsid="004bf523" style:font-size-asian="11pt" style:font-size-complex="11pt" loext:padding="0cm" loext:border="none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1pt" fo:letter-spacing="normal" fo:font-style="normal" fo:font-weight="normal" style:font-size-asian="11pt" style:font-size-complex="11pt" loext:padding="0cm" loext:border="none"/>
    </style:style>
    <style:style style:name="P2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1pt" fo:letter-spacing="normal" fo:font-style="normal" fo:font-weight="normal" style:font-size-asian="11pt" style:font-size-complex="11pt" loext:padding="0cm" loext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1pt" fo:letter-spacing="normal" fo:font-style="normal" fo:font-weight="normal" officeooo:rsid="004bf523" style:font-size-asian="11pt" style:font-size-complex="11pt" loext:padding="0cm" loext:border="none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b369e2" loext:opacity="100%" style:font-name="Liberation Serif" fo:font-size="11pt" fo:letter-spacing="normal" fo:font-style="normal" fo:font-weight="normal" officeooo:rsid="004bf523" style:font-size-asian="11pt" style:font-size-complex="11pt" loext:padding="0cm" loext:border="none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b369e2" loext:opacity="100%" style:font-name="Liberation Serif" fo:font-size="11pt" fo:letter-spacing="normal" fo:font-style="normal" fo:font-weight="bold" officeooo:rsid="004bf523" style:font-size-asian="11pt" style:font-size-complex="11pt" loext:padding="0cm" loext:border="none"/>
    </style:style>
    <style:style style:name="P25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Liberation Serif" fo:font-size="11pt" fo:letter-spacing="normal" fo:font-style="normal" fo:font-weight="normal" officeooo:rsid="004bf523" style:font-size-asian="11pt" style:font-size-complex="11pt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1pt" fo:letter-spacing="normal" fo:font-style="normal" fo:font-weight="normal" officeooo:rsid="004bf523" style:font-size-asian="11pt" style:font-size-complex="11pt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424" loext:opacity="100%" style:font-name="Liberation Serif" fo:font-size="11pt" fo:letter-spacing="normal" fo:font-style="normal" fo:font-weight="normal" officeooo:rsid="004bf523" style:font-size-asian="11pt" style:font-size-complex="11pt" loext:padding="0cm" loext:border="none"/>
    </style:style>
    <style:style style:name="P28" style:family="paragraph" style:parent-style-name="Standard">
      <style:text-properties style:font-name="Liberation Serif" fo:font-size="11pt" officeooo:rsid="004bf523" officeooo:paragraph-rsid="004bf523" style:font-size-asian="11pt" style:font-size-complex="11pt"/>
    </style:style>
    <style:style style:name="P29" style:family="paragraph" style:parent-style-name="Standard">
      <style:text-properties style:font-name="Liberation Serif" fo:font-size="11pt" officeooo:rsid="00180678" officeooo:paragraph-rsid="003e0498" style:font-size-asian="11pt" style:font-size-complex="11pt"/>
    </style:style>
    <style:style style:name="T1" style:family="text">
      <style:text-properties officeooo:rsid="001eaffe"/>
    </style:style>
    <style:style style:name="T2" style:family="text">
      <style:text-properties officeooo:rsid="00180678"/>
    </style:style>
    <style:style style:name="T3" style:family="text">
      <style:text-properties officeooo:rsid="0040e54c"/>
    </style:style>
    <style:style style:name="T4" style:family="text">
      <style:text-properties officeooo:rsid="004b5b02"/>
    </style:style>
    <style:style style:name="T5" style:family="text">
      <style:text-properties officeooo:rsid="004d448d"/>
    </style:style>
    <style:style style:name="T6" style:family="text">
      <style:text-properties fo:font-weight="bold"/>
    </style:style>
    <style:style style:name="T7" style:family="text">
      <style:text-properties fo:color="#b369e2" loext:opacity="100%" fo:font-weight="bold"/>
    </style:style>
    <style:style style:name="T8" style:family="text">
      <style:text-properties fo:color="#b369e2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CIÓN DE CONTACTOS Y COMUNICACIONES MANTENIDAS CON MITUMI</text:p>
      <text:p text:style-name="P2"/>
      <text:p text:style-name="P2"/>
      <text:p text:style-name="P2"/>
      <text:p text:style-name="P3">REUNIÓN CLIENTE MITUMI</text:p>
      <text:p text:style-name="P4"/>
      <text:p text:style-name="P5"><text:span text:style-name="T1">FECHA :</text:span>7/07/26, 09:00 H.</text:p>
      <text:p text:style-name="P6">LUGAR: <text:span text:style-name="T2"><text:s/>SEDE MITUMI</text:span></text:p>
      <text:p text:style-name="P6"/>
      <text:p text:style-name="P6">ASISTENTES:</text:p>
      <text:p text:style-name="P7">- MITUMI: MARI <text:span text:style-name="T3">GONZÁLEZ DE DURANA (DIRECTORA DE EVENTOS CORPORATIVOS)</text:span> Y CRUZ <text:span text:style-name="T3">BARROSO (GESTORA DE EVENTOS)</text:span> <text:s text:c="2"/></text:p>
      <text:p text:style-name="P8">- EQUIPO DESAFIO TRIPULACIONE BOOTCAMP: IÑIGO <text:span text:style-name="T3">IBARLUCEA MORENO (FULL STACK)</text:span> Y LEIRE ARRIETA <text:span text:style-name="T3">(DATA SCIENCE)</text:span></text:p>
      <text:p text:style-name="P7"/>
      <text:p text:style-name="Text_20_body">DOCUMENTO RESULTANTE: <text:s/>Acta_Reunion_Mitumi_07_07</text:p>
      <text:p text:style-name="Text_20_body"/>
      <text:p text:style-name="P9">______________________________________________________________________________</text:p>
      <text:p text:style-name="P10"/>
      <text:p text:style-name="P10"/>
      <text:p text:style-name="P11">INTERCAMBIOS EMAIL <text:span text:style-name="T4">PARA LA SOLICITUD DE INFORMACIÓN</text:span> :</text:p>
      <text:p text:style-name="P12"/>
      <text:p text:style-name="P12"/>
      <text:p text:style-name="P13">INTERCAMBIOS EMAIL 1:</text:p>
      <text:p text:style-name="P14"/>
      <text:p text:style-name="P15"><text:span text:style-name="T1">FECHA :</text:span><text:span text:style-name="T5">9</text:span>/07/26</text:p>
      <text:p text:style-name="P16"/>
      <text:p text:style-name="P16">ASISTENTES:</text:p>
      <text:p text:style-name="P17">- MITUMI: MARI <text:span text:style-name="T3">GONZÁLEZ DE DURANA (DIRECTORA DE EVENTOS CORPORATIVOS)</text:span> Y CRUZ <text:span text:style-name="T3">BARROSO (GESTORA DE EVENTOS)</text:span> <text:s text:c="2"/></text:p>
      <text:p text:style-name="P17">- EQUIPO DESAFIO TRIPULACIONE BOOTCAMP: IÑIGO <text:span text:style-name="T3">IBARLUCEA MORENO (FULL STACK)</text:span> Y LEIRE ARRIETA <text:span text:style-name="T3">(DATA SCIENCE)</text:span></text:p>
      <text:p text:style-name="P14"/>
      <text:p text:style-name="P18">CONTENIDO EMAIL: </text:p>
      <text:p text:style-name="P14"/>
      <text:p text:style-name="P19">Buenas Mari y Cruz.</text:p>
      <text:p text:style-name="P20"/>
      <text:p text:style-name="P20">¿Qué tal? Nada, os escribo para haceros un par de consultas. Seguimos avanzando a buen ritmo con el Desafío, pero van surgiendo preguntas...</text:p>
      <text:p text:style-name="P20"/>
      <text:p text:style-name="P21">Una de ellas quizás ya haya sido contestada por vosotras en algún momento, pero hemos estado discutiendo sobre el tema estos días, y hemos preferido trasladaros la consulta para tenerlo claro. Tiene que ver con la selección y el primer contacto con los ponentes. Tenemos dudas de hasta qué punto os viene cerrado o no el pool de ponentes a participar. Por lo que comentasteis os dan una relación de ponentes, y vosotras inicias el contacto y la gestión de la contratación, pero,</text:p>
      <text:list text:style-name="L1">
        <text:list-item>
          <text:p text:style-name="P22">¿es una relación cerrada e inamovible?, esto es: "quiero a estos tres ponentes y no puede ser nadie más";</text:p>
          <text:p text:style-name="P23"><text:span text:style-name="T6">Tal y como os dijimos en la reunión no nos parece algo relevante en el desafío este tema, como os dijimos en un 95% viene dado por el cliente ya, y cuando no viene edad</text:span> <text:span text:style-name="T6">es algo no se va a </text:span><text:soft-page-break/><text:span text:style-name="T6">solucionar con data ni con tecnología pero es algo que se trata con comités científicos y es algo de un proceso muy individual  y personalizado,</text:span></text:p>
          <text:p text:style-name="P24">Así que centraros en que los ponentes nos los da el cliente </text:p>
        </text:list-item>
        <text:list-item>
          <text:p text:style-name="P22">¿os dan un conjunto de 10 opciones por ejemplo para contratar a tres?;</text:p>
        </text:list-item>
        <text:list-item>
          <text:p text:style-name="P22">¿se da el caso de que hagáis alguna vez una búsqueda activa de ponentes? <text:span text:style-name="T7">Se da el caso pero no es una problemática que queremos enfocar en este desafío </text:span></text:p>
        </text:list-item>
        <text:list-item>
          <text:p text:style-name="P25">Incluso, y yendo más allá, ¿vienen en algún caso ya contratados desde el cliente y vosotras únicamente cerráis el proceso (viajes, documentos presentación,…)? <text:span text:style-name="T7">Si a veces sí, pero ene este</text:span><text:span text:style-name="T8"> </text:span><text:span text:style-name="T7">desafío eso nos da igual si está ya contratado por el cliente la problemática es la gestión con del, la única diferencia es si la factura final va al cliente o a nosotras, pero es un tema puramente administrativo porque en todo caso la gestión de factura recae sobre nosotras.</text:span></text:p>
        </text:list-item>
      </text:list>
      <text:p text:style-name="P26"/>
      <text:p text:style-name="P26">Si no podéis aclarar un poco este punto, agradecidos.</text:p>
      <text:p text:style-name="P26"/>
      <text:p text:style-name="P27">Y la segunda duda es más sencilla: preguntan desde la parte de Fullstack, que son los que están montando la plataforma, si trabajáis con Google Workspace. Sería una posibilidad para la creación de los registros a la nueva plataforma. <text:span text:style-name="T7">Si tenemos todo con  Google Workspace (mail, drive, Gemini….)</text:span></text:p>
      <text:p text:style-name="P26"/>
      <text:p text:style-name="P26">Es todo. Gracias y saludos,</text:p>
      <text:p text:style-name="P26"/>
      <text:p text:style-name="P26">Leire Arrieta</text:p>
      <text:p text:style-name="P28"/>
      <text:p text:style-name="P28"/>
      <text:p text:style-name="P28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Calibri" fo:font-family="Calibri" style:font-family-generic="roman" style:font-pitch="variable" style:font-charset="x-symbol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6T12:41:36.597206800</meta:creation-date>
    <dc:date>2026-07-09T13:21:16.371283100</dc:date>
    <meta:editing-duration>PT21H27M13S</meta:editing-duration>
    <meta:editing-cycles>59</meta:editing-cycles>
    <meta:generator>LibreOffice/26.2.4.2$Windows_X86_64 LibreOffice_project/0229ac93fcf0d7cbc6376066c6f35021cef002dc</meta:generator>
    <meta:document-statistic meta:table-count="0" meta:image-count="0" meta:object-count="0" meta:page-count="2" meta:paragraph-count="29" meta:word-count="500" meta:character-count="3020" meta:non-whitespace-character-count="2542"/>
  </office:meta>
</office:document-meta>
</file>